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E0000004FBE820B91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6665in" svg:y="-0.3354in" svg:width="8.0035in" svg:height="10.2862in" draw:z-index="0"><draw:image xlink:href="Pictures/10000001000003E0000004FBE820B91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2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7T10:15:36.047643592</meta:creation-date>
    <dc:title>Default</dc:title>
    <meta:editing-cycles>2</meta:editing-cycles>
    <meta:generator>LibreOffice/26.2.2.2$Linux_X86_64 LibreOffice_project/620$Build-2</meta:generator>
    <meta:editing-duration>PT42S</meta:editing-duration>
    <meta:print-date>2026-04-27T10:17:12.471361582</meta:print-date>
    <meta:printed-by>PDF files</meta:printed-by>
    <dc:date>2026-04-27T10:17:54.916599884</dc:date>
    <meta:document-statistic meta:table-count="0" meta:image-count="1" meta:object-count="0" meta:page-count="1" meta:paragraph-count="0" meta:word-count="0" meta:character-count="0" meta:non-whitespace-character-count="0"/>
    <meta:template xlink:type="simple" xlink:actuate="onRequest" xlink:title="Default" xlink:href="../../../../../../../usr/lib/libreoffice/share/template/common/styles/Default.ott" meta:date="2026-04-27T10:15:35.229850440"/>
  </office:meta>
</office:document-meta>
</file>